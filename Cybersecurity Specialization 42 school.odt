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43d550" officeooo:paragraph-rsid="0043d550"/>
    </style:style>
    <style:style style:name="P4" style:family="paragraph" style:parent-style-name="Text_20_body">
      <style:text-properties officeooo:paragraph-rsid="0020492b"/>
    </style:style>
    <style:style style:name="P5" style:family="paragraph" style:parent-style-name="Text_20_body">
      <style:text-properties officeooo:rsid="0020492b" officeooo:paragraph-rsid="0020492b"/>
    </style:style>
    <style:style style:name="P6" style:family="paragraph" style:parent-style-name="Text_20_body">
      <style:text-properties style:font-name="Liberation Sans" officeooo:rsid="002059b7" officeooo:paragraph-rsid="002059b7"/>
    </style:style>
    <style:style style:name="P7" style:family="paragraph" style:parent-style-name="Heading_20_4">
      <style:text-properties style:font-name="Liberation Sans" officeooo:rsid="00210f7e" officeooo:paragraph-rsid="00210f7e"/>
    </style:style>
    <style:style style:name="P8" style:family="paragraph" style:parent-style-name="Text_20_body">
      <style:text-properties officeooo:paragraph-rsid="00210f7e"/>
    </style:style>
    <style:style style:name="P9" style:family="paragraph" style:parent-style-name="Text_20_body">
      <style:paragraph-properties fo:text-indent="0in" style:auto-text-indent="false"/>
      <style:text-properties style:font-name="Liberation Sans" officeooo:paragraph-rsid="00210f7e"/>
    </style:style>
    <style:style style:name="P10" style:family="paragraph" style:parent-style-name="Text_20_body">
      <style:text-properties officeooo:paragraph-rsid="0026fa33"/>
    </style:style>
    <style:style style:name="P11" style:family="paragraph" style:parent-style-name="Heading_20_3">
      <style:text-properties style:font-name="Liberation Sans" style:text-underline-style="none"/>
    </style:style>
    <style:style style:name="P12" style:family="paragraph" style:parent-style-name="Text_20_body">
      <style:text-properties officeooo:paragraph-rsid="00363afb"/>
    </style:style>
    <style:style style:name="P13" style:family="paragraph" style:parent-style-name="Text_20_body">
      <style:text-properties officeooo:paragraph-rsid="0042e960"/>
    </style:style>
    <style:style style:name="P14" style:family="paragraph" style:parent-style-name="Text_20_body">
      <style:text-properties style:font-name="Liberation Sans" officeooo:rsid="0037cb4a" officeooo:paragraph-rsid="0037cb4a"/>
    </style:style>
    <style:style style:name="P15" style:family="paragraph" style:parent-style-name="Text_20_body" style:master-page-name="">
      <loext:graphic-properties draw:fill="none"/>
      <style:paragraph-properties fo:margin-left="0in" fo:margin-right="-0.25in" fo:margin-top="0in" fo:margin-bottom="0.0201in" style:contextual-spacing="false" fo:line-height="115%" fo:text-indent="0.5in" style:auto-text-indent="false" style:page-number="auto" fo:background-color="transparent"/>
      <style:text-properties officeooo:paragraph-rsid="00363afb"/>
    </style:style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 style:list-style-name="L1"/>
    <style:style style:name="P18" style:family="paragraph" style:parent-style-name="Heading_20_5">
      <style:text-properties officeooo:paragraph-rsid="00467031"/>
    </style:style>
    <style:style style:name="P19" style:family="paragraph" style:parent-style-name="Text_20_body">
      <style:text-properties officeooo:rsid="0047f3f2" officeooo:paragraph-rsid="0047f3f2"/>
    </style:style>
    <style:style style:name="P20" style:family="paragraph" style:parent-style-name="Text_20_body">
      <style:text-properties style:text-underline-style="none" officeooo:rsid="0035371a" officeooo:paragraph-rsid="0035371a"/>
    </style:style>
    <style:style style:name="T1" style:family="text">
      <style:text-properties fo:color="#bf0041" loext:opacity="100%" style:font-name="Liberation Sans" style:text-underline-style="none" officeooo:rsid="0020492b"/>
    </style:style>
    <style:style style:name="T2" style:family="text">
      <style:text-properties fo:color="#bf0041" loext:opacity="100%" style:text-underline-style="none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weight="bold" officeooo:rsid="003f6265" style:font-weight-asian="bold" style:font-weight-complex="bold"/>
    </style:style>
    <style:style style:name="T6" style:family="text">
      <style:text-properties style:font-name="Liberation Sans" officeooo:rsid="003f6265"/>
    </style:style>
    <style:style style:name="T7" style:family="text">
      <style:text-properties style:font-name="Liberation Sans" officeooo:rsid="00408a0a"/>
    </style:style>
    <style:style style:name="T8" style:family="text">
      <style:text-properties style:font-name="Liberation Sans" officeooo:rsid="0041379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10f7e"/>
    </style:style>
    <style:style style:name="T11" style:family="text">
      <style:text-properties fo:font-weight="bold" officeooo:rsid="00210f7e" style:font-weight-asian="bold" style:font-weight-complex="bold"/>
    </style:style>
    <style:style style:name="T12" style:family="text">
      <style:text-properties fo:color="#bf0041" loext:opacity="100%" style:font-name="Liberation Sans" style:text-underline-style="none"/>
    </style:style>
    <style:style style:name="T13" style:family="text">
      <style:text-properties fo:color="#bf0041" loext:opacity="100%" style:font-name="Liberation Sans" style:text-underline-style="none" officeooo:rsid="00210f7e"/>
    </style:style>
    <style:style style:name="T14" style:family="text">
      <style:text-properties fo:color="#bf0041" loext:opacity="100%" style:font-name="Liberation Sans" style:text-underline-style="none" officeooo:rsid="0027a6dc"/>
    </style:style>
    <style:style style:name="T15" style:family="text">
      <style:text-properties style:font-name="Liberation Sans" officeooo:rsid="0020492b"/>
    </style:style>
    <style:style style:name="T16" style:family="text">
      <style:text-properties style:font-name="Liberation Sans" officeooo:rsid="0022d986"/>
    </style:style>
    <style:style style:name="T17" style:family="text">
      <style:text-properties style:font-name="Liberation Sans" officeooo:rsid="0022fe95"/>
    </style:style>
    <style:style style:name="T18" style:family="text">
      <style:text-properties style:font-name="Liberation Sans" officeooo:rsid="0023b831"/>
    </style:style>
    <style:style style:name="T19" style:family="text">
      <style:text-properties fo:color="#bf0041" loext:opacity="100%" style:font-name="Liberation Sans" style:text-underline-style="none" officeooo:rsid="0026fa33"/>
    </style:style>
    <style:style style:name="T20" style:family="text">
      <style:text-properties style:text-underline-style="solid" style:text-underline-width="auto" style:text-underline-color="font-color" officeooo:rsid="0020492b"/>
    </style:style>
    <style:style style:name="T21" style:family="text">
      <style:text-properties officeooo:rsid="0020492b"/>
    </style:style>
    <style:style style:name="T22" style:family="text">
      <style:text-properties style:font-name="Liberation Sans" fo:font-style="italic" style:text-underline-style="none" fo:font-weight="bold" officeooo:rsid="003cd0dc" style:font-style-asian="italic" style:font-weight-asian="bold" style:font-style-complex="italic" style:font-weight-complex="bold"/>
    </style:style>
    <style:style style:name="T23" style:family="text">
      <style:text-properties style:font-name="Liberation Sans" style:text-underline-style="none" officeooo:rsid="003cd0dc"/>
    </style:style>
    <style:style style:name="T24" style:family="text">
      <style:text-properties style:font-name="Liberation Sans" style:text-underline-style="none" officeooo:rsid="0042e960"/>
    </style:style>
    <style:style style:name="T25" style:family="text">
      <style:text-properties style:text-underline-style="none"/>
    </style:style>
    <style:style style:name="T26" style:family="text">
      <style:text-properties style:font-name="Liberation Sans" style:text-underline-style="none" fo:font-weight="bold" officeooo:rsid="003cd0dc" style:font-weight-asian="bold" style:font-weight-complex="bold"/>
    </style:style>
    <style:style style:name="T27" style:family="text">
      <style:text-properties style:font-name="Liberation Sans" officeooo:rsid="003e404c"/>
    </style:style>
    <style:style style:name="T28" style:family="text">
      <style:text-properties style:text-underline-style="none" officeooo:rsid="00363afb"/>
    </style:style>
    <style:style style:name="T29" style:family="text">
      <style:text-properties officeooo:rsid="00467031"/>
    </style:style>
    <style:style style:name="T30" style:family="text">
      <style:text-properties officeooo:rsid="00469477"/>
    </style:style>
    <style:style style:name="T31" style:family="text">
      <style:text-properties officeooo:rsid="0047f3f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ybersecurity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998_546441430" text:style-name="Index_20_Link" text:visited-style-name="Index_20_Link">1 Piscine Cybersecurity<text:tab/>2</text:a></text:p>
          <text:p text:style-name="P2"><text:a xlink:type="simple" xlink:href="#__RefHeading___Toc81_1570430261" text:style-name="Index_20_Link" text:visited-style-name="Index_20_Link">Cybersecurity - arachnida – Web<text:tab/>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998_546441430"/><text:soft-page-break/>Piscine Cybersecurity<text:bookmark-end text:name="__RefHeading___Toc1998_546441430"/></text:h>
      <text:h text:style-name="Heading_20_2" text:outline-level="2"><text:bookmark-start text:name="__RefHeading___Toc81_1570430261"/>Cybersecurity - arachnida – Web<text:bookmark-end text:name="__RefHeading___Toc81_1570430261"/></text:h>
      <text:p text:style-name="P3">Utils:</text:p>
      <text:p text:style-name="P3"><text:a xlink:type="simple" xlink:href="https://developer.mozilla.org/en-US/docs/Web/HTTP/Reference/Status" text:style-name="Internet_20_link" text:visited-style-name="Visited_20_Internet_20_Link">https://developer.mozilla.org/en-US/docs/Web/HTTP/Reference/Status</text:a></text:p>
      <text:p text:style-name="P3"/>
      <text:h text:style-name="Heading_20_3" text:outline-level="3"><text:span text:style-name="Citation">Run the program</text:span></text:h>
      <text:p text:style-name="P4"><text:span text:style-name="T1">./Spider<text:tab/></text:span><text:a xlink:type="simple" xlink:href="https://example.com/" text:style-name="Internet_20_link" text:visited-style-name="Visited_20_Internet_20_Link"><text:span text:style-name="T2">https://www.example.com</text:span></text:a></text:p>
      <text:p text:style-name="P5"><text:span text:style-name="T3">By default, the program creates a folder named </text:span><text:span text:style-name="Source_20_Text"><text:span text:style-name="T4">data/</text:span></text:span><text:span text:style-name="T4"> </text:span><text:span text:style-name="T3">in the current directory to store all downloaded images. It downloads all images found on the main page of the given URL.</text:span></text:p>
      <text:p text:style-name="Text_20_body"><text:span text:style-name="T3">If the</text:span><text:span text:style-name="T4"> </text:span><text:span text:style-name="Source_20_Text"><text:span text:style-name="T4">-r</text:span></text:span><text:span text:style-name="T4"> </text:span><text:span text:style-name="T3">option is used, the program will download images recursively from linked pages. By default, the maximum depth is 5 if no depth is specified with the </text:span><text:span text:style-name="Source_20_Text"><text:span text:style-name="T4">-l</text:span></text:span><text:span text:style-name="T4"> </text:span><text:span text:style-name="T3">option.</text:span></text:p>
      <text:p text:style-name="Text_20_body"><text:span text:style-name="T4">-</text:span><text:span text:style-name="T5">l</text:span><text:span text:style-name="T6"> </text:span><text:span text:style-name="T7">option </text:span><text:span text:style-name="T6">fo</text:span><text:span text:style-name="T8">l</text:span><text:span text:style-name="T6">l</text:span><text:span text:style-name="T8">ow</text:span><text:span text:style-name="T6">ed by a </text:span><text:span text:style-name="T5">number</text:span><text:span text:style-name="T6"> to set </text:span><text:span text:style-name="T8">the </text:span><text:span text:style-name="T6">depth.</text:span></text:p>
      <text:p text:style-name="P6">If <text:span text:style-name="T9">-p</text:span> option is specified, <text:span text:style-name="T10">the new </text:span><text:span text:style-name="T11">path</text:span><text:span text:style-name="T10"> location must be defined.</text:span></text:p>
      <text:h text:style-name="P7" text:outline-level="4">Usage examples</text:h>
      <text:p text:style-name="P8"><text:span text:style-name="T12">./</text:span><text:span text:style-name="T13">Spider </text:span><text:a xlink:type="simple" xlink:href="https://example.com/" text:style-name="Internet_20_link" text:visited-style-name="Visited_20_Internet_20_Link"><text:span text:style-name="T1">https://</text:span><text:span text:style-name="T14">www.</text:span><text:span text:style-name="T1">example.com</text:span></text:a><text:span text:style-name="T1"> </text:span><text:span text:style-name="T3">→ Downloads images from the main page only (no recursion).</text:span></text:p>
      <text:p text:style-name="P8"><text:span text:style-name="T12">./</text:span><text:span text:style-name="T13">Spider -r </text:span><text:a xlink:type="simple" xlink:href="https://example.com/" text:style-name="Internet_20_link" text:visited-style-name="Visited_20_Internet_20_Link"><text:span text:style-name="T1">https://</text:span><text:span text:style-name="T14">www.</text:span><text:span text:style-name="T1">example.com</text:span></text:a><text:span text:style-name="T1"> </text:span><text:span text:style-name="T15">→ </text:span><text:span text:style-name="T16">Enables recursive download of linked pages with a default depth of 5</text:span></text:p>
      <text:p text:style-name="P8"><text:span text:style-name="T12">./</text:span><text:span text:style-name="T13">Spider -r -l 7 </text:span><text:a xlink:type="simple" xlink:href="https://example.com/" text:style-name="Internet_20_link" text:visited-style-name="Visited_20_Internet_20_Link"><text:span text:style-name="T1">https://</text:span><text:span text:style-name="T14">www.</text:span><text:span text:style-name="T1">example.com</text:span></text:a><text:span text:style-name="T1"> </text:span><text:span text:style-name="T15">→ </text:span><text:span text:style-name="T16">Enables a recursion with a maximum depth of 7</text:span></text:p>
      <text:p text:style-name="P8"><text:span text:style-name="T12">./</text:span><text:span text:style-name="T13">Spider -r -l 8 -p “./images/all_images” <text:s/></text:span><text:a xlink:type="simple" xlink:href="https://example.com/" text:style-name="Internet_20_link" text:visited-style-name="Visited_20_Internet_20_Link"><text:span text:style-name="T1">https://</text:span><text:span text:style-name="T14">www.</text:span><text:span text:style-name="T1">example.com</text:span></text:a><text:span text:style-name="T1"> </text:span><text:span text:style-name="T15">→ </text:span><text:span text:style-name="T17">Enables recursion with depth 8 </text:span><text:span text:style-name="T18">and saves</text:span><text:span text:style-name="T17"> </text:span><text:span text:style-name="T18">in</text:span><text:span text:style-name="T17"> </text:span><text:span text:style-name="T18">the </text:span><text:span text:style-name="T17">custom path (“./image/all_images”)</text:span></text:p>
      <text:p text:style-name="P9"><text:tab/></text:p>
      <text:p text:style-name="P10"><text:span text:style-name="T12">./</text:span><text:span text:style-name="T13">Spider -r -l </text:span><text:span text:style-name="T19">4</text:span><text:span text:style-name="T13"> -p “./images” <text:s/></text:span><text:a xlink:type="simple" xlink:href="https://www.example.com/" text:style-name="Internet_20_link" text:visited-style-name="Visited_20_Internet_20_Link"><text:span text:style-name="T1">https://</text:span><text:span text:style-name="T14">www.</text:span><text:span text:style-name="T1">example.com</text:span></text:a></text:p>
      <text:p text:style-name="P10"><text:span text:style-name="T20"/></text:p>
      <text:h text:style-name="P11" text:outline-level="3"><text:span text:style-name="T21">C</text:span>ommand Specifications</text:h>
      <text:p text:style-name="P12"><text:span text:style-name="Source_20_Text"><text:span text:style-name="T22">import requests #</text:span></text:span><text:span text:style-name="Source_20_Text"><text:span text:style-name="T23"> requests module is used to make HTTP requests</text:span></text:span></text:p>
      <text:p text:style-name="P12"><text:span text:style-name="Source_20_Text"><text:span text:style-name="T23">response = requests.get(url)</text:span></text:span></text:p>
      <text:p text:style-name="P12"><text:span text:style-name="Source_20_Text"><text:span text:style-name="T23">The HTML is stored at RAM memory</text:span></text:span></text:p>
      <text:p text:style-name="P12"><text:span text:style-name="Source_20_Text"><text:span text:style-name="T23">To extract text, use: variable = response.text</text:span></text:span></text:p>
      <text:p text:style-name="P12"><text:span text:style-name="Source_20_Text"><text:span text:style-name="T23">To Save in .txt file</text:span></text:span></text:p>
      <text:p text:style-name="P13"><text:span text:style-name="Source_20_Text"><text:span text:style-name="T24">html = response.text</text:span></text:span></text:p>
      <text:p text:style-name="P12"><text:span text:style-name="Source_20_Text"><text:span text:style-name="T23">with open("page_html.txt", "w", encoding="utf-8") as f: f.write(html)</text:span></text:span></text:p>
      <text:p text:style-name="P14"><text:span text:style-name="T25"/></text:p>
      <text:p text:style-name="P12"><text:span text:style-name="Source_20_Text"><text:span text:style-name="T23">The response variable is a object from the Requests library</text:span></text:span></text:p>
      <text:p text:style-name="P12"><text:span text:style-name="Source_20_Text"><text:span text:style-name="T23">Successful responses 200 OK</text:span></text:span></text:p>
      <text:p text:style-name="P12"><text:span text:style-name="Source_20_Text"><text:span text:style-name="T23">&lt;Response [200]&gt;</text:span></text:span></text:p>
      <text:p text:style-name="P12"><text:span text:style-name="Source_20_Text"><text:span text:style-name="T23"><text:tab/>The request succeeded. The result and meaning of "success" depends on the HTTP method:</text:span></text:span></text:p>
      <text:p text:style-name="P12"><text:span text:style-name="Source_20_Text"><text:span text:style-name="T23"/></text:span></text:p>
      <text:p text:style-name="P12"><text:span text:style-name="Source_20_Text"><text:span text:style-name="T26">GET</text:span></text:span><text:span text:style-name="Source_20_Text"><text:span text:style-name="T23">: The resource has been fetched and transmitted in the message body.</text:span></text:span></text:p>
      <text:p text:style-name="P12"><text:soft-page-break/><text:span text:style-name="Source_20_Text"><text:span text:style-name="T26">HEAD</text:span></text:span><text:span text:style-name="Source_20_Text"><text:span text:style-name="T23">: Representation headers are included in the response without any message body.</text:span></text:span></text:p>
      <text:p text:style-name="P12"><text:span text:style-name="Source_20_Text"><text:span text:style-name="T26">PUT</text:span></text:span><text:span text:style-name="Source_20_Text"><text:span text:style-name="T23"> or </text:span></text:span><text:span text:style-name="Source_20_Text"><text:span text:style-name="T26">POST</text:span></text:span><text:span text:style-name="Source_20_Text"><text:span text:style-name="T23">: The resource describing the result of the action is transmitted in the message body.</text:span></text:span></text:p>
      <text:p text:style-name="P15"><text:span text:style-name="Source_20_Text"><text:span text:style-name="T26">TRACE</text:span></text:span><text:span text:style-name="Source_20_Text"><text:span text:style-name="T23">: The message body contains the request as received by the server.</text:span></text:span></text:p>
      <text:p text:style-name="P12"><text:span text:style-name="Source_20_Text"><text:span text:style-name="T26">Inside response</text:span></text:span></text:p>
      <text:list text:style-name="L1">
        <text:list-item>
          <text:p text:style-name="P16"><text:span text:style-name="Source_20_Text"><text:span text:style-name="T3">response.text</text:span></text:span><text:span text:style-name="T3"> → HTML (</text:span><text:span text:style-name="T27">text from the page</text:span><text:span text:style-name="T3">) </text:span></text:p>
        </text:list-item>
        <text:list-item>
          <text:p text:style-name="P16"><text:span text:style-name="Source_20_Text"><text:span text:style-name="T3">response.content</text:span></text:span><text:span text:style-name="T3"> → </text:span><text:span text:style-name="T27">raw content </text:span><text:span text:style-name="T3">(bytes, us</text:span><text:span text:style-name="T27">e</text:span><text:span text:style-name="T3">d <text:s/></text:span><text:span text:style-name="T27">for</text:span><text:span text:style-name="T3"> imag</text:span><text:span text:style-name="T27">es</text:span><text:span text:style-name="T3">, PDF s, etc.) </text:span></text:p>
        </text:list-item>
        <text:list-item>
          <text:p text:style-name="P16"><text:span text:style-name="Source_20_Text"><text:span text:style-name="T3">response.status_code</text:span></text:span><text:span text:style-name="T3"> → </text:span><text:span text:style-name="T27">code</text:span><text:span text:style-name="T3"> HTTP (200, 404, etc.) </text:span></text:p>
        </text:list-item>
        <text:list-item>
          <text:p text:style-name="P17"><text:span text:style-name="Source_20_Text"><text:span text:style-name="T3">response.headers</text:span></text:span><text:span text:style-name="T3"> → headers </text:span><text:span text:style-name="T27">from response</text:span></text:p>
        </text:list-item>
      </text:list>
      <text:h text:style-name="P18" text:outline-level="5"><text:span text:style-name="T28">s</text:span><text:span text:style-name="T25">et()</text:span></text:h>
      <text:p text:style-name="Text_20_body">visited = set(), <text:span text:style-name="T29">creates a together (conjunto) like a list. </text:span><text:span text:style-name="T30">To saves all the links hurl’s</text:span></text:p>
      <text:p text:style-name="Text_20_body">visited.add(url) <text:span text:style-name="T31">add at</text:span></text:p>
      <text:p text:style-name="P19">visdited.remove(url)</text:p>
      <text:p text:style-name="P12"/>
      <text:p text:style-name="P20"/>
      <text:p text:style-name="Text_20_body"><text:span text:style-name="T25"/></text:p>
      <text:p text:style-name="Text_20_body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201in" style:contextual-spacing="false" fo:line-height="115%" fo:text-indent="0.5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055in" fo:margin-left="0.4791in" fo:margin-right="0.54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15:20:56.983231000</meta:creation-date>
    <dc:date>2026-06-01T13:57:21.533179459</dc:date>
    <meta:editing-duration>P1DT2H28M51S</meta:editing-duration>
    <meta:editing-cycles>30</meta:editing-cycles>
    <meta:generator>LibreOffice/26.2.2.2$Linux_AARCH64 LibreOffice_project/620$Build-2</meta:generator>
    <meta:document-statistic meta:table-count="0" meta:image-count="0" meta:object-count="0" meta:page-count="3" meta:paragraph-count="47" meta:word-count="368" meta:character-count="2392" meta:non-whitespace-character-count="2063"/>
  </office:meta>
</office:document-meta>
</file>