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20492b" officeooo:paragraph-rsid="0020492b"/>
    </style:style>
    <style:style style:name="P4" style:family="paragraph" style:parent-style-name="Text_20_body">
      <style:text-properties officeooo:rsid="002059b7" officeooo:paragraph-rsid="002059b7"/>
    </style:style>
    <style:style style:name="P5" style:family="paragraph" style:parent-style-name="Text_20_body">
      <style:text-properties officeooo:paragraph-rsid="00210f7e"/>
    </style:style>
    <style:style style:name="P6" style:family="paragraph" style:parent-style-name="Text_20_body">
      <style:paragraph-properties fo:text-indent="0in" style:auto-text-indent="false"/>
      <style:text-properties officeooo:paragraph-rsid="00210f7e"/>
    </style:style>
    <style:style style:name="P7" style:family="paragraph" style:parent-style-name="Text_20_body">
      <style:text-properties officeooo:paragraph-rsid="0026fa33"/>
    </style:style>
    <style:style style:name="P8" style:family="paragraph" style:parent-style-name="Heading_20_3">
      <style:text-properties style:text-underline-style="none"/>
    </style:style>
    <style:style style:name="P9" style:family="paragraph" style:parent-style-name="Heading_20_4">
      <style:text-properties officeooo:rsid="00210f7e" officeooo:paragraph-rsid="00210f7e"/>
    </style:style>
    <style:style style:name="P10" style:family="paragraph" style:parent-style-name="Heading_20_7">
      <style:text-properties officeooo:paragraph-rsid="00363afb"/>
    </style:style>
    <style:style style:name="P11" style:family="paragraph" style:parent-style-name="Standard">
      <style:paragraph-properties fo:margin-left="0.4925in" fo:text-indent="0in" style:auto-text-indent="false"/>
      <style:text-properties fo:color="#cccccc" loext:opacity="100%" style:font-name="Droid Sans Mono" fo:font-size="10.5pt" fo:font-weight="normal" officeooo:rsid="0037cb4a" officeooo:paragraph-rsid="0037cb4a" fo:background-color="transparent"/>
    </style:style>
    <style:style style:name="P12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text-properties style:text-underline-style="none" officeooo:rsid="0035371a" officeooo:paragraph-rsid="0035371a"/>
    </style:style>
    <style:style style:name="P15" style:family="paragraph" style:parent-style-name="Text_20_body">
      <style:text-properties officeooo:paragraph-rsid="00363afb"/>
    </style:style>
    <style:style style:name="P16" style:family="paragraph" style:parent-style-name="Text_20_body">
      <style:text-properties officeooo:rsid="0037cb4a" officeooo:paragraph-rsid="0037cb4a"/>
    </style:style>
    <style:style style:name="T1" style:family="text">
      <style:text-properties officeooo:rsid="0020492b"/>
    </style:style>
    <style:style style:name="T2" style:family="text">
      <style:text-properties officeooo:rsid="00210f7e"/>
    </style:style>
    <style:style style:name="T3" style:family="text">
      <style:text-properties officeooo:rsid="0022d986"/>
    </style:style>
    <style:style style:name="T4" style:family="text">
      <style:text-properties officeooo:rsid="0022fe95"/>
    </style:style>
    <style:style style:name="T5" style:family="text">
      <style:text-properties officeooo:rsid="0023b83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10f7e"/>
    </style:style>
    <style:style style:name="T8" style:family="text">
      <style:text-properties style:text-underline-style="solid" style:text-underline-width="auto" style:text-underline-color="font-color" officeooo:rsid="0020492b"/>
    </style:style>
    <style:style style:name="T9" style:family="text">
      <style:text-properties style:text-underline-style="solid" style:text-underline-width="auto" style:text-underline-color="font-color" officeooo:rsid="0026fa33"/>
    </style:style>
    <style:style style:name="T10" style:family="text">
      <style:text-properties style:text-underline-style="solid" style:text-underline-width="auto" style:text-underline-color="font-color" officeooo:rsid="0027a6d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5371a"/>
    </style:style>
    <style:style style:name="T13" style:family="text">
      <style:text-properties style:text-underline-style="none" officeooo:rsid="00363afb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c586c0" loext:opacity="100%" style:text-underline-style="none"/>
    </style:style>
    <style:style style:name="T17" style:family="text">
      <style:text-properties fo:color="#dcdcaa" loext:opacity="100%" style:text-underline-style="none"/>
    </style:style>
    <style:style style:name="T18" style:family="text">
      <style:text-properties fo:color="#ce9178" loext:opacity="100%" style:text-underline-style="none"/>
    </style:style>
    <style:style style:name="T19" style:family="text">
      <style:text-properties fo:color="#9cdcfe" loext:opacity="100%" style:text-underline-style="none"/>
    </style:style>
    <style:style style:name="T20" style:family="text">
      <style:text-properties fo:color="#d4d4d4" loext:opacity="100%" style:text-underline-style="none"/>
    </style:style>
    <style:style style:name="T21" style:family="text">
      <style:text-properties fo:color="#000000" loext:opacity="100%" style:text-underline-style="none"/>
    </style:style>
    <style:style style:name="T2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ybersecurity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998_546441430" text:style-name="Index_20_Link" text:visited-style-name="Index_20_Link">1 Piscine Cybersecurity<text:tab/>2</text:a></text:p>
          <text:p text:style-name="P2"><text:a xlink:type="simple" xlink:href="#__RefHeading___Toc81_1570430261" text:style-name="Index_20_Link" text:visited-style-name="Index_20_Link">Cybersecurity - arachnida – Web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998_546441430"/><text:soft-page-break/>Piscine Cybersecurity<text:bookmark-end text:name="__RefHeading___Toc1998_546441430"/></text:h>
      <text:h text:style-name="Heading_20_2" text:outline-level="2"><text:bookmark-start text:name="__RefHeading___Toc81_1570430261"/>Cybersecurity - arachnida – Web<text:bookmark-end text:name="__RefHeading___Toc81_1570430261"/></text:h>
      <text:h text:style-name="Heading_20_3" text:outline-level="3"><text:span text:style-name="Citation">Run the program</text:span></text:h>
      <text:p text:style-name="P3"><text:span text:style-name="T6">./Spider<text:tab/></text:span><text:a xlink:type="simple" xlink:href="https://example.com/" text:style-name="Internet_20_link" text:visited-style-name="Visited_20_Internet_20_Link"><text:span text:style-name="T6">https://</text:span><text:span text:style-name="T10">www.</text:span><text:span text:style-name="T6">example.com</text:span></text:a></text:p>
      <text:p text:style-name="P3">By default, the program creates a folder named <text:span text:style-name="Source_20_Text">data/</text:span> in the current directory to store all downloaded images. It downloads all images found on the main page of the given URL.</text:p>
      <text:p text:style-name="Text_20_body">If the <text:span text:style-name="Source_20_Text">-r</text:span> option is used, the program will download images recursively from linked pages. By default, the maximum depth is 5 if no depth is specified with the <text:span text:style-name="Source_20_Text">-l</text:span> option.</text:p>
      <text:p text:style-name="P4">If -p option is specified, <text:span text:style-name="T2">the new path location must be defined.</text:span></text:p>
      <text:h text:style-name="P9" text:outline-level="4">Usage examples</text:h>
      <text:p text:style-name="P5"><text:span text:style-name="T6">./</text:span><text:span text:style-name="T7">Spider 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8"> </text:span>→ Downloads images from the main page only (no recursion).</text:p>
      <text:p text:style-name="P5"><text:span text:style-name="T6">/</text:span><text:span text:style-name="T7">Spider -r 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8"> </text:span><text:span text:style-name="T1">→ </text:span><text:span text:style-name="T3">Enables recursive download of linked pages with a default depth of 5</text:span></text:p>
      <text:p text:style-name="P5"><text:span text:style-name="T6">/</text:span><text:span text:style-name="T7">Spider -r -l 7 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8"> </text:span><text:span text:style-name="T1">→ </text:span><text:span text:style-name="T3">Enables a recursion with a maximum depth of 7</text:span></text:p>
      <text:p text:style-name="P5"><text:span text:style-name="T6">/</text:span><text:span text:style-name="T7">Spider -r -l 8 -p “./images/all_images” <text:s/>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1"> → </text:span><text:span text:style-name="T4">Enables recursion with depth 8 </text:span><text:span text:style-name="T5">and saves</text:span><text:span text:style-name="T4"> </text:span><text:span text:style-name="T5">in</text:span><text:span text:style-name="T4"> </text:span><text:span text:style-name="T5">the </text:span><text:span text:style-name="T4">custom path (“./image/all_images”)</text:span></text:p>
      <text:p text:style-name="P6"><text:tab/></text:p>
      <text:p text:style-name="P7"><text:span text:style-name="T6">/</text:span><text:span text:style-name="T7">Spider -r -l </text:span><text:span text:style-name="T9">4</text:span><text:span text:style-name="T7"> -p “./images” <text:s/></text:span><text:a xlink:type="simple" xlink:href="https://www.example.com/" text:style-name="Internet_20_link" text:visited-style-name="Visited_20_Internet_20_Link"><text:span text:style-name="T8">https://</text:span><text:span text:style-name="T10">www.</text:span><text:span text:style-name="T8">example.com</text:span></text:a></text:p>
      <text:p text:style-name="P7"><text:span text:style-name="T8"/></text:p>
      <text:h text:style-name="P8" text:outline-level="3"><text:span text:style-name="T1">C</text:span>ommand Specifications</text:h>
      <text:p text:style-name="Text_20_body">import requests # requests module is used to make <text:span text:style-name="T22">HTTP</text:span> requests</text:p>
      <text:p text:style-name="P13">response = requests.get(url)</text:p>
      <text:p text:style-name="P15"><text:span text:style-name="T12">The HTML is stored at RAM memory</text:span></text:p>
      <text:p text:style-name="P16"><text:span text:style-name="T11">To extract in text format use variable = response.text</text:span></text:p>
      <text:p text:style-name="P16"><text:span text:style-name="T14">To Save in .txt fil</text:span><text:span text:style-name="T11">e</text:span></text:p>
      <text:p text:style-name="P11"><text:span text:style-name="T16"><text:tab/></text:span><text:span text:style-name="T21">with open("page_html.txt", "w", encoding="utf-8") as f:</text:span></text:p>
      <text:p text:style-name="P12"><text:tab/><text:tab/>f.write(html)</text:p>
      <text:p text:style-name="P16"><text:span text:style-name="T11"/></text:p>
      <text:h text:style-name="P10" text:outline-level="7"><text:soft-page-break/><text:span text:style-name="T13">Status Code</text:span></text:h>
      <text:h text:style-name="P10" text:outline-level="7" text:is-list-header="true"><text:span text:style-name="Source_20_Text"><text:span text:style-name="T15"><text:tab/>200</text:span></text:span><text:span text:style-name="T15"> → OK </text:span>✅ </text:h>
      <text:h text:style-name="P10" text:outline-level="7"><text:span text:style-name="Source_20_Text"><text:tab/>404</text:span> → não encontrado ❌ </text:h>
      <text:h text:style-name="P10" text:outline-level="7"><text:span text:style-name="Source_20_Text"><text:tab/>403</text:span> → proibido 🚫 </text:h>
      <text:p text:style-name="P15"/>
      <text:p text:style-name="P14"/>
      <text:p text:style-name="Text_20_body"><text:span text:style-name="T11"/></text:p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indent="0.5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5:20:56.983231000</meta:creation-date>
    <dc:date>2026-04-13T12:34:58.161280917</dc:date>
    <meta:editing-duration>PT22H48M31S</meta:editing-duration>
    <meta:editing-cycles>15</meta:editing-cycles>
    <meta:generator>LibreOffice/24.2.7.2$Linux_AARCH64 LibreOffice_project/420$Build-2</meta:generator>
    <meta:document-statistic meta:table-count="0" meta:image-count="0" meta:object-count="0" meta:page-count="3" meta:paragraph-count="31" meta:word-count="230" meta:character-count="1454" meta:non-whitespace-character-count="1239"/>
  </office:meta>
</office:document-meta>
</file>